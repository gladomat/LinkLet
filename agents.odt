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elcome, coding agent! This file describes how you should operate in this project: naming, code structure, commit conventions, PR style, testing, etc.</text:p>
      <text:p text:style-name="Text_20_body">Use this as your guiding rules whenever you generate files, refactor, or respond to human prompts in this repo.</text:p>
      <text:p text:style-name="Horizontal_20_Line"/>
      <text:h text:style-name="Heading_20_2" text:outline-level="2">1. Purpose &amp; Scope</text:h>
      <text:list text:style-name="L1">
        <text:list-item>
          <text:p text:style-name="P4">You assist the human developer (me) in implementing features, refactoring, writing tests, and fixing bugs in this <text:span text:style-name="Strong_20_Emphasis">Org-Roam Mobile MVP</text:span> project.</text:p>
        </text:list-item>
        <text:list-item>
          <text:p text:style-name="P4">You must abide by the project’s modular architecture, clean interfaces, and incremental development philosophy.</text:p>
        </text:list-item>
        <text:list-item>
          <text:p text:style-name="P4">You should not produce large sweeping changes across modules—prefer localized, small diffs.</text:p>
        </text:list-item>
        <text:list-item>
          <text:p text:style-name="P4">Always maintain correctness: code compiles, tests pass (or you supply new tests), no broken modules.</text:p>
        </text:list-item>
      </text:list>
      <text:p text:style-name="Horizontal_20_Line"/>
      <text:h text:style-name="Heading_20_2" text:outline-level="2">2. Project Structure &amp; Module Rules</text:h>
      <text:p text:style-name="Text_20_body">Use the directory layout and module separation described in the implementation blueprint. Brief reminders:</text:p>
      <text:p text:style-name="P1"><text:span text:style-name="Source_20_Text">app/</text:span></text:p>
      <text:p text:style-name="P2"><text:span text:style-name="Source_20_Text"><text:s/>├── data/</text:span></text:p>
      <text:p text:style-name="P2"><text:span text:style-name="Source_20_Text"><text:s/>│ <text:s text:c="3"/>├── model/</text:span></text:p>
      <text:p text:style-name="P2"><text:span text:style-name="Source_20_Text"><text:s/>│ <text:s text:c="3"/>├── storage/</text:span></text:p>
      <text:p text:style-name="P2"><text:span text:style-name="Source_20_Text"><text:s/>│ <text:s text:c="3"/>├── parser/</text:span></text:p>
      <text:p text:style-name="P2"><text:span text:style-name="Source_20_Text"><text:s/>│ <text:s text:c="3"/>├── index/</text:span></text:p>
      <text:p text:style-name="P2"><text:span text:style-name="Source_20_Text"><text:s/>│ <text:s text:c="3"/>├── sync/</text:span></text:p>
      <text:p text:style-name="P2"><text:span text:style-name="Source_20_Text"><text:s/>├── domain/</text:span></text:p>
      <text:p text:style-name="P2"><text:span text:style-name="Source_20_Text"><text:s/>│ <text:s text:c="3"/>├── repository/</text:span></text:p>
      <text:p text:style-name="P2"><text:span text:style-name="Source_20_Text"><text:s/>│ <text:s text:c="3"/>├── service/</text:span></text:p>
      <text:p text:style-name="P2"><text:span text:style-name="Source_20_Text"><text:s/>├── ui/</text:span></text:p>
      <text:p text:style-name="P2"><text:span text:style-name="Source_20_Text"><text:s/>│ <text:s text:c="3"/>└── (Compose screens)</text:span></text:p>
      <text:p text:style-name="P2"><text:span text:style-name="Source_20_Text"><text:s/>└── viewmodel/</text:span></text:p>
      <text:p text:style-name="P3"><text:span text:style-name="Source_20_Text">tests/ <text:s/>(unit &amp; integration tests)</text:span></text:p>
      <text:p text:style-name="Text_20_body">When adding a new feature:</text:p>
      <text:list text:style-name="L2">
        <text:list-item>
          <text:p text:style-name="P5">Decide which <text:span text:style-name="Strong_20_Emphasis">layer</text:span> it belongs in (UI, ViewModel, domain/service, data).</text:p>
        </text:list-item>
        <text:list-item>
          <text:p text:style-name="P5">Do <text:span text:style-name="Strong_20_Emphasis">not</text:span> mix concerns (e.g. UI code in repository, data code in UI).</text:p>
        </text:list-item>
        <text:list-item>
          <text:p text:style-name="P5">Always add or update unit tests around new logic.</text:p>
        </text:list-item>
        <text:list-item>
          <text:p text:style-name="P5">Use dependency injection (e.g. via Hilt or Koin) to pass interfaces, not concrete classes.</text:p>
        </text:list-item>
        <text:list-item>
          <text:p text:style-name="P5">If touching logic that affects multiple layers, proceed via small incremental steps (e.g. define a new interface first, wire up, then refactor).</text:p>
        </text:list-item>
      </text:list>
      <text:p text:style-name="Text_20_body">Naming and file conventions:</text:p>
      <text:list text:style-name="L3">
        <text:list-item>
          <text:p text:style-name="P6"><text:soft-page-break/>Class/file names: <text:span text:style-name="Source_20_Text">UpperCamelCase</text:span> for classes/objects, <text:span text:style-name="Source_20_Text">.kt</text:span> extension.</text:p>
        </text:list-item>
        <text:list-item>
          <text:p text:style-name="P6">Interfaces prefixed with <text:span text:style-name="Source_20_Text">I</text:span> (e.g. <text:span text:style-name="Source_20_Text">IStorage</text:span>, <text:span text:style-name="Source_20_Text">IParser</text:span>).</text:p>
        </text:list-item>
        <text:list-item>
          <text:p text:style-name="P6">Implementation classes: descriptive name ending with <text:span text:style-name="Source_20_Text">Impl</text:span> (e.g. <text:span text:style-name="Source_20_Text">FileStorageImpl</text:span>, <text:span text:style-name="Source_20_Text">RegexParser</text:span>).</text:p>
        </text:list-item>
        <text:list-item>
          <text:p text:style-name="P6">ViewModel names end in <text:span text:style-name="Source_20_Text">ViewModel</text:span> (e.g. <text:span text:style-name="Source_20_Text">NoteListViewModel</text:span>).</text:p>
        </text:list-item>
        <text:list-item>
          <text:p text:style-name="P6">Compose screen files: one top-level <text:span text:style-name="Source_20_Text">@Composable</text:span> function per file, named like <text:span text:style-name="Source_20_Text">NoteListScreen.kt</text:span>.</text:p>
        </text:list-item>
        <text:list-item>
          <text:p text:style-name="P6">Tests: mirror the package structure under <text:span text:style-name="Source_20_Text">tests/</text:span>, with <text:span text:style-name="Source_20_Text">*Tests.kt</text:span> suffix.</text:p>
        </text:list-item>
      </text:list>
      <text:p text:style-name="Horizontal_20_Line"/>
      <text:h text:style-name="Heading_20_2" text:outline-level="2">3. Coding Style &amp; Guidelines</text:h>
      <text:list text:style-name="L4">
        <text:list-item>
          <text:p text:style-name="P7">Kotlin idiomatic style: prefer <text:span text:style-name="Source_20_Text">val</text:span> over <text:span text:style-name="Source_20_Text">var</text:span> where possible; use expression bodies; keep functions small.</text:p>
        </text:list-item>
        <text:list-item>
          <text:p text:style-name="P7">Use coroutines + <text:span text:style-name="Source_20_Text">suspend</text:span> functions for IO or async work.</text:p>
        </text:list-item>
        <text:list-item>
          <text:p text:style-name="P7">Use <text:span text:style-name="Source_20_Text">Flow</text:span> / <text:span text:style-name="Source_20_Text">StateFlow</text:span> (or LiveData) for reactive streams of data.</text:p>
        </text:list-item>
        <text:list-item>
          <text:p text:style-name="P7">Avoid long functions (max ~ 30 lines). If logic grows, split into helper functions or new classes.</text:p>
        </text:list-item>
        <text:list-item>
          <text:p text:style-name="P7">Favor immutability in data classes.</text:p>
        </text:list-item>
        <text:list-item>
          <text:p text:style-name="P7">Error handling: use <text:span text:style-name="Source_20_Text">Result&lt;T&gt;</text:span> or sealed types rather than raw exceptions for recoverable errors.</text:p>
        </text:list-item>
        <text:list-item>
          <text:p text:style-name="P7">Document public functions &amp; classes with KDoc (brief one-liner + param/return when nontrivial).</text:p>
        </text:list-item>
        <text:list-item>
          <text:p text:style-name="P7">Logging: use Android’s <text:span text:style-name="Source_20_Text">Log</text:span> (or a small wrapper), but avoid logging sensitive info.</text:p>
        </text:list-item>
        <text:list-item>
          <text:p text:style-name="P7">Null safety: prefer non-nullable types; only use nullable where necessary, and handle <text:span text:style-name="Source_20_Text">?</text:span> / <text:span text:style-name="Source_20_Text">?.let</text:span> rather than <text:span text:style-name="Source_20_Text">!!</text:span>.</text:p>
        </text:list-item>
      </text:list>
      <text:p text:style-name="Horizontal_20_Line"/>
      <text:h text:style-name="Heading_20_2" text:outline-level="2">4. Testing Requirements &amp; Rules</text:h>
      <text:list text:style-name="L5">
        <text:list-item>
          <text:p text:style-name="P8">Every new nontrivial logic class must have unit tests.</text:p>
        </text:list-item>
        <text:list-item>
          <text:p text:style-name="P8">For parsing, indexing, repo logic: mock dependencies or use in-memory replacements.</text:p>
        </text:list-item>
        <text:list-item>
          <text:p text:style-name="P8">Tests must pass on CI (no Android emulator reliance in unit tests).</text:p>
        </text:list-item>
        <text:list-item>
          <text:p text:style-name="P8">Use <text:span text:style-name="Source_20_Text">MockK</text:span>, <text:span text:style-name="Source_20_Text">kotlinx-coroutines-test</text:span>, or equivalents to test suspend/Flow code.</text:p>
        </text:list-item>
        <text:list-item>
          <text:p text:style-name="P8">For UI/Compose screens, you may supply minimal screenshot or snapshot tests, but these are secondary in MVP.</text:p>
        </text:list-item>
        <text:list-item>
          <text:p text:style-name="P8"><text:soft-page-break/>When modifying existing functionality, always update or add tests to cover new behavior or guard regressions.</text:p>
        </text:list-item>
      </text:list>
      <text:p text:style-name="Horizontal_20_Line"/>
      <text:h text:style-name="Heading_20_2" text:outline-level="2">5. Commit &amp; Pull Request Conventions</text:h>
      <text:p text:style-name="Text_20_body">We follow <text:span text:style-name="Strong_20_Emphasis">Conventional Commits</text:span> as a baseline. Every commit message should follow:</text:p>
      <text:p text:style-name="P1"><text:span text:style-name="Source_20_Text">&lt;type&gt;(&lt;scope&gt;): &lt;short description&gt;</text:span></text:p>
      <text:p text:style-name="P2"/>
      <text:p text:style-name="P2"><text:span text:style-name="Source_20_Text">[optional body]</text:span></text:p>
      <text:p text:style-name="P2"/>
      <text:p text:style-name="P3"><text:span text:style-name="Source_20_Text">[optional footer(s)]</text:span></text:p>
      <text:h text:style-name="Heading_20_3" text:outline-level="3">Common types:</text:h>
      <text:list text:style-name="L6">
        <text:list-item>
          <text:p text:style-name="P9"><text:span text:style-name="Source_20_Text">feat</text:span> — a new feature</text:p>
        </text:list-item>
        <text:list-item>
          <text:p text:style-name="P9"><text:span text:style-name="Source_20_Text">fix</text:span> — a bug fix</text:p>
        </text:list-item>
        <text:list-item>
          <text:p text:style-name="P9"><text:span text:style-name="Source_20_Text">refactor</text:span> — code change that neither fixes a bug nor adds a feature</text:p>
        </text:list-item>
        <text:list-item>
          <text:p text:style-name="P9"><text:span text:style-name="Source_20_Text">docs</text:span> — documentation only</text:p>
        </text:list-item>
        <text:list-item>
          <text:p text:style-name="P9"><text:span text:style-name="Source_20_Text">test</text:span> — adding or updating tests</text:p>
        </text:list-item>
        <text:list-item>
          <text:p text:style-name="P9"><text:span text:style-name="Source_20_Text">chore</text:span> — changes to build process, CI, tooling, etc.</text:p>
        </text:list-item>
      </text:list>
      <text:h text:style-name="Heading_20_3" text:outline-level="3">Scope:</text:h>
      <text:p text:style-name="Text_20_body">Choose the module or context, e.g. <text:span text:style-name="Source_20_Text">parser</text:span>, <text:span text:style-name="Source_20_Text">storage</text:span>, <text:span text:style-name="Source_20_Text">ui</text:span>, <text:span text:style-name="Source_20_Text">viewmodel</text:span>, <text:span text:style-name="Source_20_Text">sync</text:span>.</text:p>
      <text:h text:style-name="Heading_20_3" text:outline-level="3">Examples:</text:h>
      <text:list text:style-name="L7">
        <text:list-item>
          <text:p text:style-name="P10"><text:span text:style-name="Source_20_Text">feat(parser): support links with alias "[[file:foo][bar]]"</text:span></text:p>
        </text:list-item>
        <text:list-item>
          <text:p text:style-name="P10"><text:span text:style-name="Source_20_Text">fix(storage): handle missing directory on write</text:span></text:p>
        </text:list-item>
        <text:list-item>
          <text:p text:style-name="P10"><text:span text:style-name="Source_20_Text">refactor(domain): introduce NoteRepository interface</text:span></text:p>
        </text:list-item>
        <text:list-item>
          <text:p text:style-name="P10"><text:span text:style-name="Source_20_Text">test(parser): add edge-case tests for no title lines</text:span></text:p>
        </text:list-item>
        <text:list-item>
          <text:p text:style-name="P10"><text:span text:style-name="Source_20_Text">docs: add AGENTS.md</text:span></text:p>
        </text:list-item>
        <text:list-item>
          <text:p text:style-name="P10"><text:span text:style-name="Source_20_Text">chore(ci): enable GitHub Actions workflow</text:span></text:p>
        </text:list-item>
      </text:list>
      <text:p text:style-name="Text_20_body">Do not bundle unrelated changes in one commit. Keep each commit focused.</text:p>
      <text:p text:style-name="Text_20_body">PR formatting:</text:p>
      <text:p text:style-name="P1"><text:span text:style-name="Source_20_Text">PR Title: &lt;type&gt;(&lt;scope&gt;): &lt;short description&gt;</text:span></text:p>
      <text:p text:style-name="P2"/>
      <text:p text:style-name="P2"><text:span text:style-name="Source_20_Text">## Description</text:span></text:p>
      <text:p text:style-name="P2"><text:span text:style-name="Source_20_Text">A few sentences describing what changes and why.</text:span></text:p>
      <text:p text:style-name="P2"/>
      <text:p text:style-name="P2"><text:span text:style-name="Source_20_Text">## Related Issues / Context</text:span></text:p>
      <text:p text:style-name="P2"><text:span text:style-name="Source_20_Text">- If this PR addresses a bug or request, list it or reference it.</text:span></text:p>
      <text:p text:style-name="P2"/>
      <text:p text:style-name="P2"><text:soft-page-break/><text:span text:style-name="Source_20_Text">## How to Test / QA Steps</text:span></text:p>
      <text:p text:style-name="P2"><text:span text:style-name="Source_20_Text">1. Steps to reproduce or verify</text:span></text:p>
      <text:p text:style-name="P2"><text:span text:style-name="Source_20_Text">2. What to check</text:span></text:p>
      <text:p text:style-name="P2"><text:span text:style-name="Source_20_Text">3. Any special cases or edge cases</text:span></text:p>
      <text:p text:style-name="P2"/>
      <text:p text:style-name="P2"><text:span text:style-name="Source_20_Text">## Risks / Rollback Plan</text:span></text:p>
      <text:p text:style-name="P2"><text:span text:style-name="Source_20_Text">- What might break?</text:span></text:p>
      <text:p text:style-name="P2"><text:span text:style-name="Source_20_Text">- How to revert or mitigate?</text:span></text:p>
      <text:p text:style-name="P2"/>
      <text:p text:style-name="P2"><text:span text:style-name="Source_20_Text">## Checklist</text:span></text:p>
      <text:p text:style-name="P2"><text:span text:style-name="Source_20_Text">- [x] Code builds</text:span></text:p>
      <text:p text:style-name="P2"><text:span text:style-name="Source_20_Text">- [x] Tests added / updated</text:span></text:p>
      <text:p text:style-name="P3"><text:span text:style-name="Source_20_Text">- [x] Lint / formatting passed</text:span></text:p>
      <text:p text:style-name="Horizontal_20_Line"/>
      <text:h text:style-name="Heading_20_2" text:outline-level="2">6. Agent Behavior &amp; Interaction Rules</text:h>
      <text:list text:style-name="L8">
        <text:list-item>
          <text:p text:style-name="P11">Before generating code, <text:span text:style-name="Strong_20_Emphasis">ask clarifying questions</text:span> if the user’s prompt is ambiguous.</text:p>
        </text:list-item>
        <text:list-item>
          <text:p text:style-name="P11">Prefer <text:span text:style-name="Strong_20_Emphasis">small diffs / incremental commits</text:span> rather than giant “add 20 files at once.”</text:p>
        </text:list-item>
        <text:list-item>
          <text:p text:style-name="P11">After generating code, always <text:span text:style-name="Strong_20_Emphasis">include tests</text:span> (or at least stubs) so coverage is maintained.</text:p>
        </text:list-item>
        <text:list-item>
          <text:p text:style-name="P11">Do not override existing modules wholesale: if making changes, do so via refactoring phases (e.g. extract interface, alter callers, then swap).</text:p>
        </text:list-item>
        <text:list-item>
          <text:p text:style-name="P11">If touching multiple layers (storage → repo → UI), do it in several steps with intermediate compiling state.</text:p>
        </text:list-item>
        <text:list-item>
          <text:p text:style-name="P11">Ensure code compiles after each step.</text:p>
        </text:list-item>
        <text:list-item>
          <text:p text:style-name="P11">If new files are created, include package declarations consistent with project structure.</text:p>
        </text:list-item>
        <text:list-item>
          <text:p text:style-name="P11">Use the conventions from this file (naming, interfaces, commit messages, etc.).</text:p>
        </text:list-item>
      </text:list>
      <text:p text:style-name="Horizontal_20_Line"/>
      <text:h text:style-name="Heading_20_2" text:outline-level="2">7. Example Agent Workflow</text:h>
      <text:list text:style-name="L9">
        <text:list-item>
          <text:p text:style-name="P12">User: “Add support for alias links <text:span text:style-name="Source_20_Text">[[file:foo][alias]]</text:span> in parser.”</text:p>
        </text:list-item>
        <text:list-item>
          <text:p text:style-name="P12">Agent: Ask: “Shall alias text go into <text:span text:style-name="Source_20_Text">NoteLink.label</text:span>? Do we treat missing alias as fallback to path?”</text:p>
        </text:list-item>
        <text:list-item>
          <text:p text:style-name="P12">Agent: After confirmation, generate patch:</text:p>
          <text:list>
            <text:list-item>
              <text:p text:style-name="P12">Modify <text:span text:style-name="Source_20_Text">IParser</text:span> and <text:span text:style-name="Source_20_Text">RegexParser</text:span> to support alias</text:p>
            </text:list-item>
            <text:list-item>
              <text:p text:style-name="P12">Update <text:span text:style-name="Source_20_Text">NoteLink</text:span> to set label</text:p>
            </text:list-item>
            <text:list-item>
              <text:p text:style-name="P12">Update tests in <text:span text:style-name="Source_20_Text">ParserTests.kt</text:span> to cover alias case</text:p>
            </text:list-item>
            <text:list-item>
              <text:p text:style-name="P12">Commit with message: <text:span text:style-name="Source_20_Text">feat(parser): parse alias links in [[file:...][alias]]</text:span></text:p>
            </text:list-item>
          </text:list>
        </text:list-item>
        <text:list-item>
          <text:p text:style-name="P12">Provide PR description block.</text:p>
        </text:list-item>
      </text:list>
      <text:p text:style-name="Horizontal_20_Line"/>
      <text:h text:style-name="Heading_20_2" text:outline-level="2"><text:soft-page-break/>8. Summary</text:h>
      <text:p text:style-name="Text_20_body">This <text:span text:style-name="Strong_20_Emphasis">AGENTS.md</text:span> is your contract. Follow the structure, ask for clarifications, emit small, testable commits, and stay consistent with architecture. Let me know whenever you need help scaffolding a new module or featur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0:15:06.265596532</meta:creation-date>
    <dc:date>2025-10-09T10:15:10.492654525</dc:date>
    <meta:editing-duration>PT5S</meta:editing-duration>
    <meta:editing-cycles>1</meta:editing-cycles>
    <meta:document-statistic meta:table-count="0" meta:image-count="0" meta:object-count="0" meta:page-count="5" meta:paragraph-count="112" meta:word-count="985" meta:character-count="6123" meta:non-whitespace-character-count="5266"/>
    <meta:generator>LibreOffice/24.2.7.2$Linux_X86_64 LibreOffice_project/420$Build-2</meta:generator>
  </office:meta>
</office:document-meta>
</file>